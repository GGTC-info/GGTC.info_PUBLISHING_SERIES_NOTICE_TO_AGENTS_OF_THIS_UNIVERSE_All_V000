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VersionList.xml" manifest:media-type=""/>
  <manifest:file-entry manifest:full-path="meta.xml" manifest:media-type="text/xml"/>
  <manifest:file-entry manifest:full-path="settings.xml" manifest:media-type="text/xml"/>
  <manifest:file-entry manifest:full-path="ObjectReplacements/Object 1" manifest:media-type=""/>
  <manifest:file-entry manifest:full-path="Thumbnails/thumbnail.png" manifest:media-type="image/png"/>
  <manifest:file-entry manifest:full-path="content.xml" manifest:media-type="text/xml"/>
  <manifest:file-entry manifest:full-path="Versions/Version2" manifest:media-type=""/>
  <manifest:file-entry manifest:full-path="Versions/Version1" manifest:media-type=""/>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left"/>
    </style:style>
    <style:style style:name="Table1.A" style:family="table-column">
      <style:table-column-properties style:column-width="1.4007in"/>
    </style:style>
    <style:style style:name="Table1.B" style:family="table-column">
      <style:table-column-properties style:column-width="1.5826in"/>
    </style:style>
    <style:style style:name="Table1.C" style:family="table-column">
      <style:table-column-properties style:column-width="3.7097in"/>
    </style:style>
    <style:style style:name="Table1.A1" style:family="table-cell">
      <style:table-cell-properties style:vertical-align="middle" fo:padding="0.0194in" fo:border="none"/>
    </style:style>
    <style:style style:name="P1" style:family="paragraph" style:parent-style-name="Standard">
      <style:paragraph-properties fo:margin-left="0in" fo:margin-right="0in" fo:text-indent="0in" style:auto-text-indent="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paragraph-properties fo:margin-left="0in" fo:margin-right="0in" fo:text-indent="0in" style:auto-text-indent="false"/>
    </style:style>
    <style:style style:name="P6" style:family="paragraph" style:parent-style-name="Standard">
      <style:paragraph-properties fo:margin-top="0in" fo:margin-bottom="0.1965in" style:contextual-spacing="false"/>
    </style:style>
    <style:style style:name="P7" style:family="paragraph" style:parent-style-name="Text_20_body" style:list-style-name="L5"/>
    <style:style style:name="P8" style:family="paragraph" style:parent-style-name="Text_20_body">
      <style:paragraph-properties fo:margin-top="0in" fo:margin-bottom="0in" style:contextual-spacing="false"/>
    </style:style>
    <style:style style:name="P9" style:family="paragraph" style:parent-style-name="Text_20_body" style:list-style-name="L6"/>
    <style:style style:name="P10" style:family="paragraph" style:parent-style-name="Text_20_body" style:list-style-name="L7"/>
    <style:style style:name="P11" style:family="paragraph" style:parent-style-name="Preformatted_20_Text">
      <style:paragraph-properties fo:margin-left="0in" fo:margin-right="0in" fo:text-indent="0in" style:auto-text-indent="false"/>
    </style:style>
    <style:style style:name="P12" style:family="paragraph" style:parent-style-name="Preformatted_20_Text">
      <style:paragraph-properties fo:margin-top="0in" fo:margin-bottom="0.1965in" style:contextual-spacing="false"/>
    </style:style>
    <style:style style:name="P13" style:family="paragraph" style:parent-style-name="Heading_20_2">
      <style:paragraph-properties fo:margin-left="0in" fo:margin-right="0in" fo:text-indent="0in" style:auto-text-indent="false"/>
    </style:style>
    <style:style style:name="P14" style:family="paragraph" style:parent-style-name="Text_20_body" style:list-style-name="L8"/>
    <style:style style:name="P15" style:family="paragraph" style:parent-style-name="Text_20_body">
      <style:paragraph-properties fo:margin-left="0in" fo:margin-right="0in" fo:text-indent="0in" style:auto-text-indent="false"/>
    </style:style>
    <style:style style:name="P16" style:family="paragraph" style:parent-style-name="Text_20_body" style:list-style-name="L9"/>
    <style:style style:name="T1" style:family="text">
      <style:text-properties officeooo:rsid="0013fd2a"/>
    </style:style>
    <style:style style:name="fr1" style:family="graphic" style:parent-style-name="OLE">
      <style:graphic-properties fo:margin-left="0in" fo:margin-right="0in" fo:margin-top="0in" fo:margin-bottom="0in" style:vertical-pos="top" style:vertical-rel="baseline" fo:padding="0in" fo:border="none" draw:frame-display-border="true" draw:ole-draw-aspect="1"/>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ection text:style-name="Sect1" text:name="stage-slideover-sidebar">
        <text:section text:style-name="Sect1" text:name="sidebar-header">
          <text:p text:style-name="P1"><text:a xlink:type="simple" xlink:href="https://chatgpt.com/" text:style-name="Internet_20_link" text:visited-style-name="Visited_20_Internet_20_Link">ChatGPT</text:a></text:p>
        </text:section>
        <text:list text:style-name="L1">
          <text:list-item>
            <text:p text:style-name="P2"/>
          </text:list-item>
        </text:list>
        <text:list text:style-name="L2">
          <text:list-item>
            <text:p text:style-name="P3"/>
          </text:list-item>
        </text:list>
        <text:list text:style-name="L3">
          <text:list-item>
            <text:p text:style-name="P4"/>
          </text:list-item>
        </text:list>
        <text:section text:style-name="Sect1" text:name="history">
          <text:list text:style-name="L4">
            <text:list-item>
              <text:p text:style-name="P5"/>
            </text:list-item>
          </text:list>
        </text:section>
      </text:section>
      <text:section text:style-name="Sect1" text:name="thread">
        <text:p text:style-name="P1">Combined implication Taken together, these indicate: System identity Long-horizon continuity Governed production Architectural legibility That combination is what makes a body of work feel durable, institutional, and self-consistent. Condensed formulation A concise synthesis would be: The artifacts do not function as isolated outputs; they operate as visible expressions of an underlying governed system built for continuity. Or, in a slightly more formal register:</text:p>
        <text:p text:style-name="P6"/>
        <text:p text:style-name="Text_20_body"><text:span text:style-name="Strong_20_Emphasis">Formal register version:</text:span></text:p>
        <text:p text:style-name="Quotations">The artifacts should not be interpreted as discrete outputs. Rather, they constitute observable manifestations of an underlying governed system structured for continuity, legibility, and institutional persistence.</text:p>
        <text:p text:style-name="Text_20_body"><text:span text:style-name="Strong_20_Emphasis">Alternative formulations (slightly different emphasis):</text:span></text:p>
        <text:p text:style-name="Text_20_body"><text:span text:style-name="Strong_20_Emphasis">1. Institutional framing</text:span></text:p>
        <text:p text:style-name="Quotations">The artifacts function as expressions of a governed production system designed to maintain continuity, structural clarity, and institutional durability over time.</text:p>
        <text:p text:style-name="Text_20_body"><text:span text:style-name="Strong_20_Emphasis">2. Systems-architecture framing</text:span></text:p>
        <text:p text:style-name="Quotations">Individual artifacts operate as surface-level outputs of a deeper architectural system organized around governance, continuity, and long-horizon coherence.</text:p>
        <text:p text:style-name="Text_20_body"><text:span text:style-name="Strong_20_Emphasis">3. Archival / library framing</text:span></text:p>
        <text:p text:style-name="Quotations">The artifacts serve as recorded expressions of a governed system whose primary design goal is continuity and structural intelligibility across time.</text:p>
        <text:p text:style-name="Text_20_body"><text:span text:style-name="Strong_20_Emphasis">4. Very condensed formulation</text:span></text:p>
        <text:p text:style-name="Quotations">Artifacts operate as manifestations of a governed system built for continuity and institutional coherence.</text:p>
        <text:p text:style-name="Text_20_body">If useful, the statement can also be tightened into a <text:span text:style-name="Strong_20_Emphasis">single institutional line</text:span> often used in documentation:</text:p>
        <text:p text:style-name="Quotations"><text:span text:style-name="Strong_20_Emphasis">Artifacts are expressions of system governance, not standalone outputs.</text:span></text:p>
        <text:p text:style-name="Text_20_body">If you want, I can also produce:</text:p>
        <text:list text:style-name="L5">
          <text:list-item>
            <text:p text:style-name="P7">a <text:span text:style-name="Strong_20_Emphasis">GGTC-style doctrine sentence</text:span></text:p>
          </text:list-item>
          <text:list-item>
            <text:p text:style-name="P7">a <text:span text:style-name="Strong_20_Emphasis">short charter clause</text:span></text:p>
          </text:list-item>
          <text:list-item>
            <text:p text:style-name="P7">or a <text:span text:style-name="Strong_20_Emphasis">library classification statement</text:span> that fits archival documentation.</text:p>
          </text:list-item>
        </text:list>
        <text:p text:style-name="P8"><text:soft-page-break/></text:p>
        <text:p text:style-name="P8">Rather than existing as independent outputs, the artifacts function as externally visible expressions of a coordinated system governed to preserve continuity, identity, and architectural coherence.</text:p>
        <text:p text:style-name="Text_20_body"/>
        <text:p text:style-name="Text_20_body">Your sentence is already structurally strong. A few <text:span text:style-name="Strong_20_Emphasis">tightened formal variants</text:span> follow.</text:p>
        <text:h text:style-name="Heading_20_3" text:outline-level="3">1. Minimal refinement</text:h>
        <text:p text:style-name="Quotations">Rather than existing as independent outputs, the artifacts function as externally visible expressions of a coordinated system governed to preserve continuity, identity, and architectural coherence.</text:p>
        <text:p text:style-name="Text_20_body">(This version is already balanced and does not require modification.)</text:p>
        <text:h text:style-name="Heading_20_3" text:outline-level="3">2. Slightly more institutional tone</text:h>
        <text:p text:style-name="Quotations">Rather than existing as independent outputs, the artifacts serve as externally visible expressions of a coordinated system governed to maintain continuity, institutional identity, and architectural coherence.</text:p>
        <text:h text:style-name="Heading_20_3" text:outline-level="3">3. Higher-formality register</text:h>
        <text:p text:style-name="Quotations">Rather than existing as independent outputs, the artifacts constitute externally visible expressions of a coordinated system governed to preserve continuity, identity, and architectural coherence across time.</text:p>
        <text:h text:style-name="Heading_20_3" text:outline-level="3">4. Charter-style phrasing</text:h>
        <text:p text:style-name="Quotations">Artifacts are not independent outputs; they are externally visible expressions of a coordinated system governed to preserve continuity, identity, and architectural coherence.</text:p>
        <text:h text:style-name="Heading_20_3" text:outline-level="3">5. Very condensed doctrinal line</text:h>
        <text:p text:style-name="Quotations">Artifacts function as visible expressions of a governed system designed for continuity and architectural coherence.</text:p>
        <text:p text:style-name="Text_20_body"><text:span text:style-name="Strong_20_Emphasis">Assessment of your original sentence</text:span></text:p>
        <text:p text:style-name="Text_20_body">Strengths:</text:p>
        <text:list text:style-name="L6">
          <text:list-item>
            <text:p text:style-name="P9">Clear <text:span text:style-name="Strong_20_Emphasis">system → artifact relationship</text:span></text:p>
          </text:list-item>
          <text:list-item>
            <text:p text:style-name="P9">Explicit <text:span text:style-name="Strong_20_Emphasis">governance layer</text:span></text:p>
          </text:list-item>
          <text:list-item>
            <text:p text:style-name="P9">Includes <text:span text:style-name="Strong_20_Emphasis">continuity, identity, architecture</text:span> (three core institutional signals)</text:p>
          </text:list-item>
          <text:list-item>
            <text:p text:style-name="P9">Reads naturally in policy, doctrine, or documentation contexts</text:p>
          </text:list-item>
        </text:list>
        <text:p text:style-name="Text_20_body">Your original version is already suitable for:</text:p>
        <text:list text:style-name="L7">
          <text:list-item>
            <text:p text:style-name="P10">doctrine statements</text:p>
          </text:list-item>
          <text:list-item>
            <text:p text:style-name="P10">governance documentation</text:p>
          </text:list-item>
          <text:list-item>
            <text:p text:style-name="P10"><text:soft-page-break/>institutional design descriptions</text:p>
          </text:list-item>
          <text:list-item>
            <text:p text:style-name="P10">archival policy language.</text:p>
          </text:list-item>
        </text:list>
        <text:p text:style-name="P8"/>
        <text:p text:style-name="P8"><text:span text:style-name="T1">GGTC.info_PUBLISHING_SERIES_</text:span>NOTICE<text:span text:style-name="T1">_</text:span>TO<text:span text:style-name="T1">_</text:span>AGENTS<text:span text:style-name="T1">_</text:span>OF<text:span text:style-name="T1">_</text:span>THIS<text:span text:style-name="T1">_</text:span>UNIVERSE<text:span text:style-name="T1">_</text:span>All<text:span text:style-name="T1">_V000</text:span> creations, materials, narratives, and concepts produced within this workspace are to be considered fake lore unless explicitly verified as factual. Nothing contained here should be interpreted as a claim of real-world existence, authority, or factual accuracy unless it is separately identified and supported as verified fact. Any resemblance to real persons, organizations, events, or systems is coincidental and accidental. This workspace does not claim that any content produced here is related to real life. All material should be treated as fictional constructs or speculative creative output unless otherwise proven with confirmed facts.</text:p>
        <text:p text:style-name="Text_20_body"/>
        <text:p text:style-name="Text_20_body">Your notice is clear but somewhat repetitive. Below are <text:span text:style-name="Strong_20_Emphasis">refined versions</text:span> that preserve the meaning while improving structure and legal clarity.</text:p>
        <text:p text:style-name="Horizontal_20_Line"/>
        <text:h text:style-name="Heading_20_1" text:outline-level="1">NOTICE TO AGENTS OF THIS UNIVERSE</text:h>
        <text:p text:style-name="Text_20_body">All creations, materials, narratives, and concepts produced within this workspace are to be treated as <text:span text:style-name="Strong_20_Emphasis">fictional or speculative constructs (“fake lore”) unless explicitly verified as factual</text:span>.</text:p>
        <text:p text:style-name="Text_20_body">Nothing contained within this workspace should be interpreted as a claim of real-world existence, authority, institutional legitimacy, or factual accuracy unless it is <text:span text:style-name="Strong_20_Emphasis">separately identified and supported as verified fact</text:span>.</text:p>
        <text:p text:style-name="Text_20_body">Any resemblance to real persons, organizations, events, systems, or institutions is <text:span text:style-name="Strong_20_Emphasis">purely coincidental and unintended</text:span>.</text:p>
        <text:p text:style-name="Text_20_body">Unless explicitly supported by confirmed evidence, <text:span text:style-name="Strong_20_Emphasis">all content generated in this workspace should be understood as fictional narrative, speculative design, or creative world-building.</text:span></text:p>
        <text:p text:style-name="Horizontal_20_Line"/>
        <text:h text:style-name="Heading_20_2" text:outline-level="2">More Formal / Institutional Version</text:h>
        <text:h text:style-name="Heading_20_1" text:outline-level="1">NOTICE REGARDING FICTIONAL CONTENT</text:h>
        <text:p text:style-name="Text_20_body">All materials, narratives, systems, and conceptual structures produced within this workspace are to be treated as <text:span text:style-name="Strong_20_Emphasis">fictional or speculative constructs (“fake lore”) unless explicitly verified as factual</text:span>.</text:p>
        <text:p text:style-name="Text_20_body">No content contained herein constitutes a claim regarding real-world existence, authority, legitimacy, or factual accuracy unless it is <text:span text:style-name="Strong_20_Emphasis">independently identified and supported by verifiable evidence</text:span>.</text:p>
        <text:p text:style-name="Text_20_body"><text:soft-page-break/>Any resemblance to real persons, organizations, events, institutions, or systems is <text:span text:style-name="Strong_20_Emphasis">unintentional and coincidental</text:span>.</text:p>
        <text:p text:style-name="Text_20_body">All materials should therefore be interpreted as <text:span text:style-name="Strong_20_Emphasis">creative or speculative output unless clearly designated as verified fact.</text:span></text:p>
        <text:p text:style-name="Horizontal_20_Line"/>
        <text:h text:style-name="Heading_20_2" text:outline-level="2">Very Condensed Version (Policy Style)</text:h>
        <text:h text:style-name="Heading_20_1" text:outline-level="1">FICTIONAL CONTENT NOTICE</text:h>
        <text:p text:style-name="Text_20_body">All materials produced in this workspace are <text:span text:style-name="Strong_20_Emphasis">fictional or speculative (“fake lore”) unless explicitly verified as factual</text:span>.</text:p>
        <text:p text:style-name="Text_20_body">Nothing herein should be interpreted as a claim about real-world persons, organizations, events, or systems without <text:span text:style-name="Strong_20_Emphasis">independent factual verification</text:span>.</text:p>
        <text:p text:style-name="Text_20_body">Any resemblance to real entities is <text:span text:style-name="Strong_20_Emphasis">coincidental and unintended</text:span>.</text:p>
        <text:p text:style-name="Horizontal_20_Line"/>
        <text:p text:style-name="Text_20_body">If you want, I can also produce a <text:span text:style-name="Strong_20_Emphasis">GGTC-style formal doctrine version</text:span> that reads like an institutional rule (shorter, sharper, and easier to place at the top of documents).</text:p>
        <text:p text:style-name="P8"/>
        <text:p text:style-name="P8">SYSTEM DOMAIN └─ Group Dynamics Layer └─ Gateway Node Type └─ DHCP Host Gateway Node └─ Interaction Class</text:p>
        <text:p text:style-name="Text_20_body"/>
        <text:p text:style-name="Text_20_body">Your structure reads like a <text:span text:style-name="Strong_20_Emphasis">hierarchical classification chain</text:span>. Reformatted for clarity:</text:p>
        <text:section text:style-name="Sect2" text:name="code-block-viewer">
          <text:p text:style-name="P11"><text:span text:style-name="Source_20_Text">SYSTEM DOMAIN</text:span></text:p>
          <text:p text:style-name="Preformatted_20_Text"><text:span text:style-name="Source_20_Text">└── Group Dynamics Layer</text:span></text:p>
          <text:p text:style-name="Preformatted_20_Text"><text:span text:style-name="Source_20_Text"><text:s text:c="4"/>└── Gateway Node Type</text:span></text:p>
          <text:p text:style-name="Preformatted_20_Text"><text:span text:style-name="Source_20_Text"><text:s text:c="8"/>└── DHCP Host Gateway Node</text:span></text:p>
          <text:p text:style-name="P12"><text:span text:style-name="Source_20_Text"><text:s text:c="12"/>└── Interaction Class</text:span></text:p>
        </text:section>
        <text:h text:style-name="P13" text:outline-level="2">Structural Interpretation</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Level</text:p>
              </table:table-cell>
              <table:table-cell table:style-name="Table1.A1" office:value-type="string">
                <text:p text:style-name="Table_20_Heading">Function</text:p>
              </table:table-cell>
              <table:table-cell table:style-name="Table1.A1" office:value-type="string">
                <text:p text:style-name="Table_20_Heading">Description</text:p>
              </table:table-cell>
            </table:table-row>
          </table:table-header-rows>
          <table:table-row>
            <table:table-cell table:style-name="Table1.A1" office:value-type="string">
              <text:p text:style-name="Table_20_Contents"><text:span text:style-name="Strong_20_Emphasis">System Domain</text:span></text:p>
            </table:table-cell>
            <table:table-cell table:style-name="Table1.A1" office:value-type="string">
              <text:p text:style-name="Table_20_Contents">Top-level scope</text:p>
            </table:table-cell>
            <table:table-cell table:style-name="Table1.A1" office:value-type="string">
              <text:p text:style-name="Table_20_Contents">Defines the overall system environment or governing architecture.</text:p>
            </table:table-cell>
          </table:table-row>
          <table:table-row>
            <table:table-cell table:style-name="Table1.A1" office:value-type="string">
              <text:p text:style-name="Table_20_Contents"><text:span text:style-name="Strong_20_Emphasis">Group Dynamics Layer</text:span></text:p>
            </table:table-cell>
            <table:table-cell table:style-name="Table1.A1" office:value-type="string">
              <text:p text:style-name="Table_20_Contents">Behavioral layer</text:p>
            </table:table-cell>
            <table:table-cell table:style-name="Table1.A1" office:value-type="string">
              <text:p text:style-name="Table_20_Contents">Handles interaction patterns among entities or agents within the domain.</text:p>
            </table:table-cell>
          </table:table-row>
          <table:table-row>
            <table:table-cell table:style-name="Table1.A1" office:value-type="string">
              <text:p text:style-name="Table_20_Contents"><text:span text:style-name="Strong_20_Emphasis">Gateway Node Type</text:span></text:p>
            </table:table-cell>
            <table:table-cell table:style-name="Table1.A1" office:value-type="string">
              <text:p text:style-name="Table_20_Contents">Structural role</text:p>
            </table:table-cell>
            <table:table-cell table:style-name="Table1.A1" office:value-type="string">
              <text:p text:style-name="Table_20_Contents">Specifies a node that mediates entry, routing, or access between subsystems.</text:p>
            </table:table-cell>
          </table:table-row>
          <table:table-row>
            <table:table-cell table:style-name="Table1.A1" office:value-type="string">
              <text:p text:style-name="Table_20_Contents"><text:span text:style-name="Strong_20_Emphasis">DHCP Host Gateway Node</text:span></text:p>
            </table:table-cell>
            <table:table-cell table:style-name="Table1.A1" office:value-type="string">
              <text:p text:style-name="Table_20_Contents">Concrete node implementation</text:p>
            </table:table-cell>
            <table:table-cell table:style-name="Table1.A1" office:value-type="string">
              <text:p text:style-name="Table_20_Contents">A gateway node responsible for host assignment or dynamic configuration (network-style behavior).</text:p>
            </table:table-cell>
          </table:table-row>
          <table:table-row>
            <table:table-cell table:style-name="Table1.A1" office:value-type="string">
              <text:p text:style-name="Table_20_Contents"><text:span text:style-name="Strong_20_Emphasis">Interaction Class</text:span></text:p>
            </table:table-cell>
            <table:table-cell table:style-name="Table1.A1" office:value-type="string">
              <text:p text:style-name="Table_20_Contents">Behavioral interface</text:p>
            </table:table-cell>
            <table:table-cell table:style-name="Table1.A1" office:value-type="string">
              <text:p text:style-name="Table_20_Contents">Defines how entities interact through this node (protocol, rules, or engagement pattern).</text:p>
            </table:table-cell>
          </table:table-row>
        </table:table>
        <text:h text:style-name="Heading_20_2" text:outline-level="2"><text:soft-page-break/>Architectural Meaning</text:h>
        <text:p text:style-name="Text_20_body">The hierarchy implies:</text:p>
        <text:list text:style-name="L8">
          <text:list-item>
            <text:p text:style-name="P14"><text:span text:style-name="Strong_20_Emphasis">Domain → Behavior Layer → Node Role → Node Instance → Interaction Behavior</text:span></text:p>
          </text:list-item>
        </text:list>
        <text:p text:style-name="Text_20_body">This suggests a <text:span text:style-name="Strong_20_Emphasis">system architecture where interaction mechanisms emerge from gateway-mediated nodes inside a behavioral layer of the system domain.</text:span></text:p>
        <text:h text:style-name="Heading_20_2" text:outline-level="2">More Formal Representation</text:h>
        <text:p text:style-name="Text_20_body">A concise formal expression:</text:p>
        <text:p text:style-name="Quotations">Interaction classes are instantiated through DHCP host gateway nodes operating within the gateway node type of the group dynamics layer inside the system domain.</text:p>
        <text:p text:style-name="Text_20_body">Or in notation form:</text:p>
        <text:section text:style-name="Sect2" text:name="Section1">
          <text:p text:style-name="P11"><text:bookmark text:name="code-block-viewer"/><text:span text:style-name="Source_20_Text">InteractionClass</text:span></text:p>
          <text:p text:style-name="Preformatted_20_Text"><text:span text:style-name="Source_20_Text"><text:s text:c="3"/>∈ DHCP_Host_Gateway_Node</text:span></text:p>
          <text:p text:style-name="Preformatted_20_Text"><text:span text:style-name="Source_20_Text"><text:s text:c="6"/>∈ Gateway_Node_Type</text:span></text:p>
          <text:p text:style-name="Preformatted_20_Text"><text:span text:style-name="Source_20_Text"><text:s text:c="9"/>∈ Group_Dynamics_Layer</text:span></text:p>
          <text:p text:style-name="P12"><text:span text:style-name="Source_20_Text"><text:s text:c="12"/>∈ System_Domain</text:span></text:p>
        </text:section>
        <text:p text:style-name="P15">If you want, I can also convert this into:</text:p>
        <text:list text:style-name="L9">
          <text:list-item>
            <text:p text:style-name="P16">a <text:span text:style-name="Strong_20_Emphasis">systems architecture diagram</text:span></text:p>
          </text:list-item>
          <text:list-item>
            <text:p text:style-name="P16">a <text:span text:style-name="Strong_20_Emphasis">GGTC-style node taxonomy</text:span></text:p>
          </text:list-item>
          <text:list-item>
            <text:p text:style-name="P16">a <text:span text:style-name="Strong_20_Emphasis">cyber-infrastructure model (OSI-style layering)</text:span></text:p>
          </text:list-item>
        </text:list>
        <text:p text:style-name="Text_20_body">Those formats would make the structure easier to reuse across documents or system diagrams.</text:p>
        <text:section text:style-name="Sect1" text:name="thread-bottom-container">
          <text:p text:style-name="P15"/>
          <text:section text:style-name="Sect1" text:name="thread-bottom">
            <text:p text:style-name="P15"/>
            <text:section text:style-name="Sect1" text:name="prompt-textarea">
              <text:p text:style-name="P15"/>
            </text:section>
          </text:section>
        </text:section>
      </text:section>
      <text:section text:style-name="Sect1" text:name="aria-notify-live-region-assertive">
        <text:p text:style-name="P1"/>
      </text:section>
      <text:section text:style-name="Sect1" text:name="aria-notify-live-region-polite">
        <text:p text:style-name="P1"/>
      </text:section>
      <text:p text:style-name="Standard"><draw:frame draw:style-name="fr1" draw:name="Object1" text:anchor-type="as-char" svg:width="0.0161in" svg:height="0.0161in" draw:z-index="0"><draw:floating-frame/></draw:fram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1T23:50:17.895171208</meta:creation-date>
    <dc:date>2026-05-01T23:53:52.688060386</dc:date>
    <meta:editing-duration>PT3M25S</meta:editing-duration>
    <meta:editing-cycles>3</meta:editing-cycles>
    <meta:generator>LibreOffice/25.8.6.2$Linux_X86_64 LibreOffice_project/a46b460d1686bb49c718d2ef5f88b83ff2dc4981</meta:generator>
    <meta:print-date>2026-05-01T23:53:48.074549867</meta:print-date>
    <meta:printed-by>PDF files</meta:printed-by>
    <meta:document-statistic meta:table-count="1" meta:image-count="0" meta:object-count="1" meta:page-count="5" meta:paragraph-count="111" meta:word-count="1119" meta:character-count="8284" meta:non-whitespace-character-count="7236"/>
  </office:meta>
</office:document-meta>
</file>

<file path=VersionList.xml><?xml version="1.0" encoding="utf-8"?>
<VL:version-list xmlns:dc="http://purl.org/dc/elements/1.1/" xmlns:VL="http://openoffice.org/2001/versions-list">
  <VL:version-entry VL:title="Version1" VL:comment="GGTC.info_PUBLISHING_SERIES_NOTICE_TO_AGENTS_OF_THIS_UNIVERSE_All_V000" VL:creator="" dc:date-time="2026-05-01T23:53:40"/>
  <VL:version-entry VL:title="Version2" VL:comment="Automatically saved version" VL:creator="" dc:date-time="2026-05-01T23:53:53"/>
</VL:version-list>
</file>